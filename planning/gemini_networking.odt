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P22" style:parent-style-name="Normal" style:list-style-name="LFO3" style:family="paragraph"/>
    <style:style style:name="P23" style:parent-style-name="Normal" style:list-style-name="LFO3" style:family="paragraph"/>
  </office:automatic-styles>
  <office:body>
    <office:text text:use-soft-page-breaks="true">
      <text:p text:style-name="P1">This is a document written from a conversation with Google Gemini to give a general direction of how to handle networking for Foxbox.</text:p>
      <text:p text:style-name="Normal">It recommended using the plugin Netfox for the most precise networking.<text:s/></text:p>
      <text:p text:style-name="Normal"/>
      <text:p text:style-name="P2"/>
      <text:p text:style-name="Normal"><text:span text:style-name="T3">Core Philosophy:</text:span><text:s/>The<text:s/>Server is the only true reality. The Client is a dumb TV screen that smoothly interpolates data. The Foxbox library (FoxCharacter, etc.) is a "Black Box" that knows nothing about the network, driven entirely by pluggable "Brains."</text:p>
      <text:p text:style-name="Normal"><text:span text:style-name="T4">The Network Tiers:</text:span></text:p>
      <text:list text:style-name="LFO1" text:continue-numbering="true">
        <text:list-item>
          <text:p text:style-name="P5"><text:span text:style-name="T6">Tier 1 (Visual Projectiles):</text:span><text:s/>Pure Client authority or simple Milestone RPCs. (Spawn -&gt; Travel -&gt; Die).</text:p>
        </text:list-item>
        <text:list-item>
          <text:p text:style-name="P7"><text:span text:style-name="T8">Tier 2 (Kinematic Swarm):</text:span><text:s/>20Hz Server State Sync. No prediction. Clients use basic Linear Interpolation (lerp).</text:p>
        </text:list-item>
        <text:list-item>
          <text:p text:style-name="P9"><text:span text:style-name="T10">Tier 3 (Dynamic Physics/Vehicles):</text:span><text:s/>20Hz Server State Sync. Sends Position + Velocity. Clients use Hermite Splines (Dead Reckoning) to maintain smooth momentum.</text:p>
        </text:list-item>
        <text:list-item>
          <text:p text:style-name="P11"><text:span text:style-name="T12">Tier 4 (Hero Unit):</text:span><text:s/>Uses netfox for Client-Side Prediction and Server Reconciliation (Rollback). Provides zero-latency input for the possessed character.</text:p>
        </text:list-item>
      </text:list>
      <text:p text:style-name="Normal"><text:span text:style-name="T13">Bandwidth Optimizations:</text:span></text:p>
      <text:list text:style-name="LFO2" text:continue-numbering="true">
        <text:list-item>
          <text:p text:style-name="P14"><text:span text:style-name="T15">PackedByteArrays:</text:span><text:s/>Squishing all Tier 2 and Tier 3 units into raw memory arrays to eliminate Godot Node overhead.</text:p>
        </text:list-item>
        <text:list-item>
          <text:p text:style-name="P16"><text:span text:style-name="T17">Distance Culling (The Bubble):</text:span><text:s/>Server only sends updates to clients for units within their camera's relevance radius.</text:p>
        </text:list-item>
        <text:list-item>
          <text:p text:style-name="P18"><text:span text:style-name="T19">Delta Compression (The Dirty Flag):</text:span><text:s/>Server only packs data for units that have actively moved or changed state since the last 20Hz tick.</text:p>
        </text:list-item>
      </text:list>
      <text:p text:style-name="Normal"><text:span text:style-name="T20">The Golden Rules:</text:span></text:p>
      <text:list text:style-name="LFO3" text:continue-numbering="true">
        <text:list-item>
          <text:p text:style-name="P21">Never sync the skeleton; sync the AnimationTree parameters (Pitch, Yaw, Speed).</text:p>
        </text:list-item>
        <text:list-item>
          <text:p text:style-name="P22">Never<text:s/>use Client-Side Prediction for the RTS Sky Camera (it cannot physically collide, so it doesn't need rollback).</text:p>
        </text:list-item>
        <text:list-item>
          <text:p text:style-name="P23">Always spawn the logical bullet at the Server's "Eyes" and the visual tracer at the Client's "Muzzle."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loy, Tate (mall4894@vandals.uidaho.edu)</meta:initial-creator>
    <dc:creator>Malloy, Tate (mall4894@vandals.uidaho.edu)</dc:creator>
    <meta:creation-date>2026-03-09T02:41:00Z</meta:creation-date>
    <dc:date>2026-03-27T06:36:00Z</dc:date>
    <meta:template xlink:href="Normal.dotm" xlink:type="simple"/>
    <meta:editing-cycles>4</meta:editing-cycles>
    <meta:editing-duration>PT60S</meta:editing-duration>
    <meta:document-statistic meta:page-count="1" meta:paragraph-count="18" meta:word-count="263" meta:character-count="1703" meta:row-count="31" meta:non-whitespace-character-count="1458"/>
  </office:meta>
</office:document-meta>
</file>